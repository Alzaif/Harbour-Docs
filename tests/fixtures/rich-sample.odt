
<file path=META-INF/manifest.xml><?xml version="1.0" encoding="utf-8"?>
<manifest xmlns="urn:oasis:names:tc:opendocument:xmlns:manifest:1.0">
  <file-entry full-path="/" media-type="application/vnd.oasis.opendocument.text"/>
  <file-entry full-path="content.xml" media-type="text/xml"/>
  <file-entry full-path="Pictures/test-image.png" media-type="image/png"/>
  <file-entry full-path="styles.xml" media-type="text/xml"/>
</manifest>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xlink="http://www.w3.org/1999/xlink" xmlns:svg="urn:oasis:names:tc:opendocument:xmlns:svg-compatible:1.0" office:version="1.2">
  <office:body>
    <office:text>
      <text:h text:outline-level="1">Rich document title</text:h>
      <text:p>Intro paragraph with plain text for import testing.</text:p>
      <text:p text:style-name="Standard">Second paragraph before an embedded image.</text:p>
      <draw:frame draw:name="ImageFrame1" text:anchor-type="paragraph" svg:width="3cm" svg:height="3cm">
        <draw:image xlink:href="Pictures/test-image.png" xlink:type="simple" xlink:show="embed" xlink:actuate="onLoad"/>
      </draw:frame>
      <text:p>Paragraph after the draw:frame image refer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office:version="1.2">
  <office:styles>
    <style:style style:name="Standard" style:family="paragraph" style:class="text"/>
    <style:style style:name="Heading_20_1" style:family="paragraph" style:parent-style-name="Standard">
      <style:text-properties xmlns:fo="urn:oasis:names:tc:opendocument:xmlns:xsl-fo-compatible:1.0" fo:font-weight="bold"/>
    </style:style>
  </office:styles>
</office:document-styles>
</file>